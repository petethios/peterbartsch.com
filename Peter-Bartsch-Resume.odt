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indent="0in" style:auto-text-indent="false" style:page-number="1"/>
    </style:style>
    <style:style style:name="P3" style:family="paragraph" style:parent-style-name="Standard">
      <style:paragraph-properties fo:margin-left="-0.4374in" fo:margin-right="-0.5in" fo:text-indent="0in" style:auto-text-indent="false"/>
    </style:style>
    <style:style style:name="P4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999999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7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666666"/>
    </style:style>
    <style:style style:name="P8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9" style:family="paragraph" style:parent-style-name="Standard">
      <style:paragraph-properties fo:margin-left="-0.4374in" fo:margin-right="0in" fo:text-indent="0in" style:auto-text-indent="false"/>
    </style:style>
    <style:style style:name="P10" style:family="paragraph" style:parent-style-name="Standard">
      <style:paragraph-properties fo:margin-left="-0.4374in" fo:margin-right="0in" fo:text-indent="0in" style:auto-text-indent="false"/>
      <style:text-properties fo:color="#434343" fo:font-size="4pt" style:font-size-asian="4pt" style:font-size-complex="4pt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21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23" style:family="paragraph" style:parent-style-name="Standard">
      <style:paragraph-properties fo:margin-left="0.25in" fo:margin-right="0in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.25in" fo:margin-right="0in" fo:text-indent="0in" style:auto-text-indent="false"/>
    </style:style>
    <style:style style:name="P26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color="#333333" fo:font-size="12pt" fo:background-color="#fafafa" loext:char-shading-value="0" style:font-size-asian="12pt" style:font-size-complex="12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color="#9999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41413" style:font-name="Roboto" fo:font-size="10.5pt" style:font-name-asian="Roboto1" style:font-size-asian="10.5pt" style:font-name-complex="Roboto1" style:font-size-complex="10.5pt" fo:background-color="#ffffff"/>
    </style:style>
    <style:style style:name="T6" style:family="text">
      <style:text-properties fo:color="#141413" style:font-name="Roboto" fo:font-size="10.5pt" fo:font-weight="bold" style:font-name-asian="Roboto1" style:font-size-asian="10.5pt" style:font-weight-asian="bold" style:font-name-complex="Roboto1" style:font-size-complex="10.5pt" style:font-weight-complex="bold" fo:background-color="#ffffff"/>
    </style:style>
    <style:style style:name="T7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434343" fo:font-size="10pt" style:font-size-asian="10pt" style:font-size-complex="10pt"/>
    </style:style>
    <style:style style:name="T9" style:family="text">
      <style:text-properties fo:color="#434343" fo:font-size="10pt" style:text-underline-style="none" style:font-size-asian="10pt" style:font-size-complex="10pt"/>
    </style:style>
    <style:style style:name="T10" style:family="text">
      <style:text-properties fo:color="#434343"/>
    </style:style>
    <style:style style:name="T11" style:family="text">
      <style:text-properties fo:color="#43434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ff Product Designer · Founder. Led design for $3.8B platform at Deere (500K users). Built design org 1→10 at FourKites through $3M→$100M ARR ($1B+ valuation). Now founder of Thios (thios.co) — open-hardware modular structures with a CAD-driven configurator and a 5-surface design system.</text:span></text:p>
      <text:p text:style-name="P4"><text:span text:style-name="T3">PROFESSIONAL EXPERIENCE</text:span></text:p>
      <text:p text:style-name="P8"><text:span text:style-name="T4">THIOS (thios.co) | Founder &amp; Lead Designer </text:span>| Aug 2024 - Present<text:line-break/><text:span text:style-name="T5">Open-source modular structures (saunas, greenhouses, offices) running on a 5-surface design system where I'm the only designer and agents are the team.</text:span></text:p>
      <text:list xml:id="list1348338525" text:style-name="WWNum2">
        <text:list-item>
          <text:p text:style-name="P11"><text:span text:style-name="T7">Shipped a complete product ecosystem solo in 18 months:</text:span><text:span text:style-name="T8"> brand, 3 websites, 6 sphere variants with CAD models, physical prototype, first revenue</text:span></text:p>
        </text:list-item>
        <text:list-item>
          <text:p text:style-name="P14"><text:span text:style-name="T7">One parametric OnShape CAD file drives the bill of materials and the 3D configurator at thios.co/configurator</text:span><text:span text:style-name="T8"> — customers see actual geometry, not marketing renders</text:span></text:p>
        </text:list-item>
        <text:list-item>
          <text:p text:style-name="P17"><text:span text:style-name="T7">Open-hardware distribution under CERN-OHL-S v2: </text:span><text:span text:style-name="T8">license + builder tools route demand to local makers; share-alike modifications loop back into the CAD — capital-light scale without factories<text:line-break/></text:span></text:p>
        </text:list-item>
      </text:list>
      <text:p text:style-name="P8"><text:span text:style-name="T4">JOHN DEERE | Senior Lead UX; Digital Customer Experience</text:span> | Aug 2020 - Jul 2024 <text:line-break/>Embedded with product teams to modernize 20-year-old systems and drive subscription revenue. Proving enterprise design can move fast when you have the right frameworks.</text:p>
      <text:list xml:id="list150337916235009" text:continue-numbering="true" text:style-name="WWNum2">
        <text:list-item>
          <text:p text:style-name="P11"><text:span text:style-name="T7">Redesigned license management system</text:span><text:span text:style-name="T8"> serving 500K+ users across 12 languages—increased authenticated engagement 34%, reduced support tickets 16%, enabled $3.8B in subscription revenue from Automation and AI services<text:line-break/></text:span></text:p>
        </text:list-item>
        <text:list-item>
          <text:p text:style-name="P14"><text:span text:style-name="T7">Built unified account and navigation framework</text:span><text:span text:style-name="T8"> deployed across 8 product lines (web, mobile, embedded)—consolidated fragmented experiences into single customer view, improved dealer support efficiency 28%<text:line-break/></text:span></text:p>
        </text:list-item>
        <text:list-item>
          <text:p text:style-name="P17"><text:span text:style-name="T6">Core contributor</text:span><text:span text:style-name="T5"> to enterprise design system in Figma spanning 6 brands</text:span><text:span text:style-name="T8"> and 40+ product teams globally—reduced design-to-development handoff time 45% through standardized components that actually shipped</text:span></text:p>
        </text:list-item>
      </text:list>
      <text:p text:style-name="P1"><text:span text:style-name="T4"><text:line-break/>FOURKITES | Lead UX / Manager</text:span> | Jan 2017 - Jan 2020<text:line-break/>Employee #28 during hypergrowth, $3M to $100M ARR (<text:span text:style-name="T1">$1B+ valuation</text:span>). Built design function from scratch—founding designer to 10-person global team.</text:p>
      <text:list xml:id="list1232914651" text:style-name="WWNum1">
        <text:list-item>
          <text:p text:style-name="P12"><text:span text:style-name="T7">Designed flagship products from 0→1</text:span><text:span text:style-name="T8">: Real-time supply chain control tower and related mobile apps processing 10M+ daily tracking events for 30+ Fortune 2000 companies (Anheuser-Busch, Georgia-Pacific, Tyson); products became primary driver of 3x customer expansion</text:span></text:p>
        </text:list-item>
        <text:list-item>
          <text:p text:style-name="P15"><text:span text:style-name="T7">Led bespoke predictive analytics dashboard products</text:span><text:span text:style-name="T8"> identifying shipment delays 6-12 hours earlier than competitors; increased customer retention 41% and expanded average contract value $120K annually</text:span></text:p>
        </text:list-item>
        <text:list-item>
          <text:p text:style-name="P18"><text:span text:style-name="T7">Scaled design org</text:span><text:span text:style-name="T8">: Hired and managed team across Chicago and Chennai; established component library, design operations, and hiring framework—reduced design inconsistencies 65% while maintaining startup velocity</text:span></text:p>
        </text:list-item>
      </text:list>
      <text:p text:style-name="P21"/>
      <text:p text:style-name="P22"><text:span text:style-name="T4"><text:line-break/>MAVENWAVE PARTNERS | Senior UX + Agile Lead (Consultant)</text:span> | Jan 2014 - Jan 2017 <text:line-break/>Led digital product design for Fortune 500 healthcare and pharmaceutical clients. Fast iteration in slow-moving industries.</text:p>
      <text:list xml:id="list3695981234" text:style-name="WWNum3">
        <text:list-item>
          <text:p text:style-name="P13"><text:span text:style-name="T7">Designed 6 internal portals for AbbVie</text:span><text:span text:style-name="T8"> supporting 200K+ users across clinical trials and patient support programs—improved medication adherence tracking, reduced hospital readmissions 12%</text:span></text:p>
        </text:list-item>
        <text:list-item>
          <text:p text:style-name="P16"><text:span text:style-name="T7">Rebuilt OptumRx pharmacy formulary platform</text:span><text:span text:style-name="T8"> processing 1.4B prescriptions annually—created company's first patient-facing product, reduced fulfillment errors 15% through improved drug interaction warnings</text:span></text:p>
        </text:list-item>
        <text:list-item>
          <text:p text:style-name="P19"><text:span text:style-name="T7">Established Lean UX and Agile practices</text:span><text:span text:style-name="T8"> across client engagements while mentoring junior designers and leading cross-functional design sprints</text:span></text:p>
        </text:list-item>
      </text:list>
      <text:p text:style-name="P5"/>
      <text:p text:style-name="P9"><text:span text:style-name="T3">SKILLS</text:span></text:p>
      <text:p text:style-name="Standard"><text:span text:style-name="T11">Design Leadership</text:span></text:p>
      <text:p text:style-name="P23"><text:span text:style-name="T8">Enterprise Design Systems • Cross-functional Team Building • Design Operations • Information Architecture • Data Visualization • Accessibility (WCAG 2.1)</text:span></text:p>
      <text:p text:style-name="P10"/>
      <text:p text:style-name="Standard"><text:span text:style-name="T11">Research &amp; Strategy</text:span></text:p>
      <text:p text:style-name="P23"><text:soft-page-break/><text:span text:style-name="T8">User Research • Usability Testing • Journey Mapping • Design Sprints • Lean UX • Agile/Scrum</text:span></text:p>
      <text:p text:style-name="P10"/>
      <text:p text:style-name="P24"><text:span text:style-name="T11">Tools</text:span></text:p>
      <text:p text:style-name="P23"><text:span text:style-name="T8">Figma • Adobe Creative Suite • CAD/3D (OnShape) • HTML/CSS • AI Tools (Claude, Cursor) • Prototyping • AI-Augmented Workflows • AI-Integrated Design • Blender 3D</text:span></text:p>
      <text:p text:style-name="P5"/>
      <text:p text:style-name="P6"><text:span text:style-name="T3">EDUCATION<text:line-break/></text:span><text:span text:style-name="T7">Arizona State University</text:span><text:span text:style-name="T8"> </text:span><text:span text:style-name="T7">| </text:span><text:span text:style-name="T8">Bachelor of Arts, Humanities and Architectural Theory</text:span></text:p>
      <text:p text:style-name="P7"/>
      <text:p text:style-name="P6"><text:span text:style-name="T3">COMMUNITY</text:span></text:p>
      <text:p text:style-name="P6"><text:span text:style-name="T7">Board Director | </text:span><text:span text:style-name="T8">How Weird Street Faire 501(c)(3) SF street fair with successful 20 year run (2004 - 202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608" meta:character-count="4307" meta:non-whitespace-character-count="3728"/>
    <meta:generator>LibreOfficeDev/6.0.5.2$Linux_X86_64 LibreOffice_project/</meta:generator>
  </office:meta>
</office:document-meta>
</file>