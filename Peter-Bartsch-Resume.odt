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4327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-0.4374in" fo:margin-right="-0.4327in" fo:margin-top="0.1665in" fo:margin-bottom="0.1665in" loext:contextual-spacing="false" fo:line-height="100%" fo:text-indent="0in" style:auto-text-indent="false" style:page-number="1"/>
    </style:style>
    <style:style style:name="P3" style:family="paragraph" style:parent-style-name="Standard">
      <style:paragraph-properties fo:margin-left="-0.4374in" fo:margin-right="-0.5in" fo:text-indent="0in" style:auto-text-indent="false"/>
    </style:style>
    <style:style style:name="P4" style:family="paragraph" style:parent-style-name="Standard">
      <style:paragraph-properties fo:margin-left="-0.4374in" fo:margin-right="-0.5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999999"/>
    </style:style>
    <style:style style:name="P6" style:family="paragraph" style:parent-style-name="Standard">
      <style:paragraph-properties fo:margin-left="-0.4374in" fo:margin-right="-0.5in" fo:text-align="justify" style:justify-single-word="false" fo:text-indent="0in" style:auto-text-indent="false"/>
    </style:style>
    <style:style style:name="P7" style:family="paragraph" style:parent-style-name="Standard">
      <style:paragraph-properties fo:margin-left="-0.4374in" fo:margin-right="-0.5in" fo:text-align="justify" style:justify-single-word="false" fo:text-indent="0in" style:auto-text-indent="false"/>
      <style:text-properties fo:color="#666666"/>
    </style:style>
    <style:style style:name="P8" style:family="paragraph" style:parent-style-name="Standard">
      <style:paragraph-properties fo:margin-left="-0.4374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-0.4374in" fo:margin-right="0in" fo:text-indent="0in" style:auto-text-indent="false"/>
    </style:style>
    <style:style style:name="P10" style:family="paragraph" style:parent-style-name="Standard">
      <style:paragraph-properties fo:margin-left="-0.4374in" fo:margin-right="0in" fo:text-indent="0in" style:auto-text-indent="false"/>
      <style:text-properties fo:color="#434343" fo:font-size="4pt" style:font-size-asian="4pt" style:font-size-complex="4pt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left="-0.3752in" fo:margin-right="-0.4327in" fo:margin-top="0.1665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.25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.25in" fo:margin-right="0in" fo:text-indent="0in" style:auto-text-indent="false"/>
    </style:style>
    <style:style style:name="P24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T1" style:family="text">
      <style:text-properties fo:color="#141413" style:font-name="Roboto" fo:font-size="10.5pt" style:font-name-asian="Roboto1" style:font-size-asian="10.5pt" style:font-name-complex="Roboto1" style:font-size-complex="10.5pt" fo:background-color="#ffffff"/>
    </style:style>
    <style:style style:name="T2" style:family="text">
      <style:text-properties fo:color="#141413" style:font-name="Roboto" fo:font-size="10.5pt" fo:font-weight="bold" style:font-name-asian="Roboto1" style:font-size-asian="10.5pt" style:font-weight-asian="bold" style:font-name-complex="Roboto1" style:font-size-complex="10.5pt" style:font-weight-complex="bold" fo:background-color="#ffffff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434343" fo:font-size="10pt" style:font-size-asian="10pt" style:font-size-complex="10pt"/>
    </style:style>
    <style:style style:name="T8" style:family="text">
      <style:text-properties fo:color="#434343"/>
    </style:style>
    <style:style style:name="T9" style:family="text">
      <style:text-properties fo:color="#434343" fo:font-weight="bold" style:font-weight-asian="bold" style:font-weight-complex="bold"/>
    </style:style>
    <style:style style:name="T10" style:family="text">
      <style:text-properties fo:color="#333333" fo:font-size="12pt" fo:background-color="#fafafa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ff Product Designer — Enterprise Platforms &amp; 0→1. Led design for $3.8B platform at Deere (500K users). Built design org 1→10 at FourKites through $3M→$100M ARR ($1B+ valuation). 15 years shipping enterprise systems that actually get adopted.</text:span></text:p>
      <text:p text:style-name="P4"><text:span text:style-name="T4">PROFESSIONAL EXPERIENCE</text:span></text:p>
      <text:p text:style-name="P8"><text:span text:style-name="T5">THIOS | Founder &amp; Lead Designer</text:span> | Aug 2024 - Present <text:line-break/><text:span text:style-name="T1">Between enterprise roles — shipped a complete product ecosystem solo using AI tooling to demonstrate full-stack design range.</text:span></text:p>
      <text:list xml:id="list425018011" text:style-name="WWNum2">
        <text:list-item>
          <text:p text:style-name="P11"><text:span text:style-name="T6">Created complete product ecosystem solo in 18 months</text:span><text:span text:style-name="T7">: brand identity inspired by early 2000s open-source culture, 3 websites (thios.co, blog, store), 5 shelter variants with CAD models, physical prototype, and handbook generating first revenue</text:span></text:p>
        </text:list-item>
        <text:list-item>
          <text:p text:style-name="P14"><text:span text:style-name="T6">Applied full career toolkit simultaneously</text:span><text:span text:style-name="T7">—product strategy, marketing, and design execution using GitHub Copilot → Cursor → Anti Gravity progression; proving experienced generalists can operate across traditional role boundaries with AI partnership</text:span></text:p>
        </text:list-item>
        <text:list-item>
          <text:p text:style-name="P14"><text:span text:style-name="T6">Established AI-augmented workflows</text:span><text:span text:style-name="T7">: Obsidian MD + AI for project management and research synthesis; Figma Make for design-to-code; compressed prototyping cycles 70% through conversational development in Cursor and Anti-Gravity &amp; Claude Code</text:span></text:p>
        </text:list-item>
        <text:list-item>
          <text:p text:style-name="P17"><text:span text:style-name="T6">Outcomes</text:span><text:span text:style-name="T7">: Validated AI as practical force multiplier for startups; demonstrating how to maintain product quality while working at solo-founder velocity; any prototype is possible</text:span></text:p>
        </text:list-item>
      </text:list>
      <text:p text:style-name="P1"><text:span text:style-name="T5">FOURKITES | Lead UX / Manager</text:span> | Jan 2017 - Jan 2020<text:line-break/>Employee #28 during hypergrowth, $3M to $100M ARR (<text:span text:style-name="T10">$1B+ valuation</text:span>). Built design function from scratch—founding designer to 10-person global team.</text:p>
      <text:list xml:id="list3908431565" text:style-name="WWNum1">
        <text:list-item>
          <text:p text:style-name="P12"><text:span text:style-name="T6">Designed flagship products from 0→1</text:span><text:span text:style-name="T7">: Real-time supply chain control tower and related mobile apps processing 10M+ daily tracking events for 30+ Fortune 2000 companies (Anheuser-Busch, Georgia-Pacific, Tyson); products became primary driver of 3x customer expansion</text:span></text:p>
        </text:list-item>
        <text:list-item>
          <text:p text:style-name="P15"><text:span text:style-name="T6">Led bespoke predictive analytics dashboard products</text:span><text:span text:style-name="T7"> identifying shipment delays 6-12 hours earlier than competitors; increased customer retention 41% and expanded average contract value $120K annually</text:span></text:p>
        </text:list-item>
        <text:list-item>
          <text:p text:style-name="P18"><text:span text:style-name="T6">Scaled design org</text:span><text:span text:style-name="T7">: Hired and managed team across Chicago and Chennai; established component library, design operations, and hiring framework—reduced design inconsistencies 65% while maintaining startup velocity</text:span></text:p>
        </text:list-item>
      </text:list>
      <text:p text:style-name="P8"><text:span text:style-name="T5">JOHN DEERE | Senior Lead UX; Digital Customer Experience</text:span> | Aug 2020 - Jul 2024 <text:line-break/>Embedded with product teams to modernize 20-year-old systems and drive subscription revenue. Proving enterprise design can move fast when you have the right frameworks.</text:p>
      <text:list xml:id="list152321520058631" text:continue-list="list425018011" text:style-name="WWNum2">
        <text:list-item>
          <text:p text:style-name="P11"><text:span text:style-name="T6">Redesigned license management system</text:span><text:span text:style-name="T7"> serving 500K+ users across 12 languages—increased authenticated engagement 34%, reduced support tickets 16%, enabled $3.8B in subscription revenue from Automation and AI services<text:line-break/></text:span></text:p>
        </text:list-item>
        <text:list-item>
          <text:p text:style-name="P14"><text:span text:style-name="T6">Built unified account and navigation framework</text:span><text:span text:style-name="T7"> deployed across 8 product lines (web, mobile, embedded)—consolidated fragmented experiences into single customer view, improved dealer support efficiency 28%<text:line-break/></text:span></text:p>
        </text:list-item>
        <text:list-item>
          <text:p text:style-name="P17"><text:span text:style-name="T2">Core contributor</text:span><text:span text:style-name="T1"> to enterprise design system in Figma spanning 6 brands</text:span><text:span text:style-name="T7"> and 40+ product teams globally—reduced design-to-development handoff time 45% through standardized components that actually shipped</text:span></text:p>
        </text:list-item>
      </text:list>
      <text:p text:style-name="P20"><text:span text:style-name="T5"><text:line-break/>MAVENWAVE PARTNERS | Senior UX + Agile Lead (Consultant)</text:span> | Jan 2014 - Jan 2017 <text:line-break/>Led digital product design for Fortune 500 healthcare and pharmaceutical clients. Fast iteration in slow-moving industries.</text:p>
      <text:list xml:id="list1486653733" text:style-name="WWNum3">
        <text:list-item>
          <text:p text:style-name="P13"><text:span text:style-name="T6">Designed 6 internal portals for AbbVie</text:span><text:span text:style-name="T7"> supporting 200K+ users across clinical trials and patient support programs—improved medication adherence tracking, reduced hospital readmissions 12%</text:span></text:p>
        </text:list-item>
        <text:list-item>
          <text:p text:style-name="P16"><text:span text:style-name="T6">Rebuilt OptumRx pharmacy formulary platform</text:span><text:span text:style-name="T7"> processing 1.4B prescriptions annually—created company's first patient-facing product, reduced fulfillment errors 15% through improved drug interaction warnings</text:span></text:p>
        </text:list-item>
        <text:list-item>
          <text:p text:style-name="P19"><text:span text:style-name="T6">Established Lean UX and Agile practices</text:span><text:span text:style-name="T7"> across client engagements while mentoring junior designers and leading cross-functional design sprints</text:span></text:p>
        </text:list-item>
      </text:list>
      <text:p text:style-name="P5"/>
      <text:p text:style-name="P9"><text:span text:style-name="T4">SKILLS</text:span></text:p>
      <text:p text:style-name="Standard"><text:span text:style-name="T9">Design Leadership</text:span></text:p>
      <text:p text:style-name="P21"><text:span text:style-name="T7">Enterprise Design Systems • Cross-functional Team Building • Design Operations • Information Architecture • Data Visualization • Accessibility (WCAG 2.1)</text:span></text:p>
      <text:p text:style-name="P10"/>
      <text:p text:style-name="Standard"><text:span text:style-name="T9">Research &amp; Strategy</text:span></text:p>
      <text:p text:style-name="P21"><text:soft-page-break/><text:span text:style-name="T7">User Research • Usability Testing • Journey Mapping • Design Sprints • Lean UX • Agile/Scrum</text:span></text:p>
      <text:p text:style-name="P10"/>
      <text:p text:style-name="P22"><text:span text:style-name="T9">Tools</text:span></text:p>
      <text:p text:style-name="P21"><text:span text:style-name="T7">Figma • Adobe Creative Suite • CAD/3D (OnShape) • HTML/CSS • AI Tools (Claude, Cursor) • Prototyping • AI-Augmented Workflows • AI-Integrated Design • Blender 3D</text:span></text:p>
      <text:p text:style-name="P5"/>
      <text:p text:style-name="P6"><text:span text:style-name="T4">EDUCATION<text:line-break/></text:span><text:span text:style-name="T6">Arizona State University</text:span><text:span text:style-name="T7"> </text:span><text:span text:style-name="T6">| </text:span><text:span text:style-name="T7">Bachelor of Arts, Humanities and Architectural Theory</text:span></text:p>
      <text:p text:style-name="P7"/>
      <text:p text:style-name="P6"><text:span text:style-name="T4">COMMUNITY</text:span></text:p>
      <text:p text:style-name="P6"><text:span text:style-name="T6">Board Director | </text:span><text:span text:style-name="T7">How Weird Street Faire 501(c)(3) SF street fair with successful 20 year run (2004 - 202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-0.4374in" fo:margin-right="-0.5in" fo:margin-top="0in" fo:margin-bottom="0.0835in" loext:contextual-spacing="false" fo:line-height="100%" fo:text-indent="0in" style:auto-text-indent="false"/>
    </style:style>
    <style:style style:name="MP2" style:family="paragraph" style:parent-style-name="Standard">
      <style:paragraph-properties fo:margin-left="-0.4374in" fo:margin-right="-0.5in" fo:text-indent="0in" style:auto-text-indent="false"/>
    </style:style>
    <style:style style:name="MT1" style:family="text">
      <style:text-properties fo:color="#434343"/>
    </style:style>
    <style:style style:name="MT2" style:family="text">
      <style:text-properties fo:color="#434343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v1qdw49vp2i"/><text:span text:style-name="MT1">PETER BARTSCH</text:span></text:p>
        <text:p text:style-name="MP1"><text:bookmark text:name="_h1lx31740bhw"/><text:span text:style-name="MT2">(847) 636-2708 <text:s text:c="2"/>| <text:s text:c="2"/>peter@peterbartsch.com <text:s text:c="2"/>| <text:s text:c="2"/>portfolio: peterbartsch.com <text:s/>| <text:s/>http://linkedin.com/in/peterbartsch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648" meta:character-count="4638" meta:non-whitespace-character-count="4024"/>
    <meta:generator>LibreOfficeDev/6.0.5.2$Linux_X86_64 LibreOffice_project/</meta:generator>
  </office:meta>
</office:document-meta>
</file>