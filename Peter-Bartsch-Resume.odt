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margin-left="-0.4374in" fo:margin-right="-0.5in" fo:text-indent="0in" style:auto-text-indent="false"/>
    </style:style>
    <style:style style:name="P3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4" style:family="paragraph" style:parent-style-name="Standard">
      <style:paragraph-properties fo:margin-left="-0.4374in" fo:margin-right="-0.5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indent="0in" style:auto-text-indent="false"/>
      <style:text-properties fo:color="#434343" fo:font-size="10pt" style:font-size-asian="10pt" style:font-size-complex="10pt"/>
    </style:style>
    <style:style style:name="P7" style:family="paragraph" style:parent-style-name="Standard" style:master-page-name="Standard">
      <style:paragraph-properties fo:margin-left="-0.4374in" fo:margin-right="-0.5in" fo:text-align="justify" style:justify-single-word="false" fo:text-indent="0in" style:auto-text-indent="false" style:page-number="1"/>
    </style:style>
    <style:style style:name="P8" style:family="paragraph" style:parent-style-name="Standard" style:list-style-name="WWNum5">
      <style:paragraph-properties fo:margin-left="-0.3126in" fo:margin-right="-0.5in" fo:text-indent="-0.1252in" style:auto-text-indent="false"/>
    </style:style>
    <style:style style:name="P9" style:family="paragraph" style:parent-style-name="Standard" style:list-style-name="WWNum4">
      <style:paragraph-properties fo:margin-left="-0.3126in" fo:margin-right="-0.5in" fo:text-indent="-0.1252in" style:auto-text-indent="false"/>
    </style:style>
    <style:style style:name="P10" style:family="paragraph" style:parent-style-name="Standard" style:list-style-name="WWNum1">
      <style:paragraph-properties fo:margin-left="-0.3126in" fo:margin-right="-0.5in" fo:text-indent="-0.1252in" style:auto-text-indent="false"/>
    </style:style>
    <style:style style:name="P11" style:family="paragraph" style:parent-style-name="Standard" style:list-style-name="WWNum6">
      <style:paragraph-properties fo:margin-left="-0.3126in" fo:margin-right="-0.5in" fo:text-indent="-0.1252in" style:auto-text-indent="false"/>
    </style:style>
    <style:style style:name="P12" style:family="paragraph" style:parent-style-name="Standard" style:list-style-name="WWNum3">
      <style:paragraph-properties fo:margin-left="-0.3126in" fo:margin-right="-0.5in" fo:text-indent="-0.1252in" style:auto-text-indent="false"/>
    </style:style>
    <style:style style:name="P13" style:family="paragraph" style:parent-style-name="Standard">
      <style:paragraph-properties fo:margin-left="0.5in" fo:margin-right="-0.5in" fo:text-indent="0in" style:auto-text-indent="false"/>
      <style:text-properties fo:color="#434343" fo:font-size="9pt" style:font-size-asian="9pt" style:font-size-complex="9pt"/>
    </style:style>
    <style:style style:name="P14" style:family="paragraph" style:parent-style-name="Standard" style:list-style-name="WWNum2">
      <style:paragraph-properties fo:margin-left="-0.3126in" fo:margin-right="0in" fo:text-indent="-0.1252in" style:auto-text-indent="false"/>
    </style:style>
    <style:style style:name="P15" style:family="paragraph" style:parent-style-name="Standard">
      <style:paragraph-properties fo:margin-left="-0.4374in" fo:margin-right="0in" fo:text-indent="0in" style:auto-text-indent="false"/>
    </style:style>
    <style:style style:name="P16" style:family="paragraph" style:parent-style-name="Standard">
      <style:paragraph-properties fo:margin-left="-0.4374in" fo:margin-right="0in" fo:text-indent="0in" style:auto-text-indent="false"/>
      <style:text-properties fo:font-size="8pt" style:font-size-asian="8pt" style:font-size-complex="8pt"/>
    </style:style>
    <style:style style:name="P17" style:family="paragraph" style:parent-style-name="Heading_20_2">
      <style:paragraph-properties fo:margin-left="-0.4374in" fo:margin-right="-0.5in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666666"/>
    </style:style>
    <style:style style:name="T4" style:family="text">
      <style:text-properties fo:color="#666666" fo:font-size="8pt" style:font-size-asian="8pt" style:font-size-complex="8pt"/>
    </style:style>
    <style:style style:name="T5" style:family="text">
      <style:text-properties fo:color="#434343" fo:font-size="10pt" fo:font-weight="bold" style:font-size-asian="10pt" style:font-weight-asian="bold" style:font-size-complex="10pt"/>
    </style:style>
    <style:style style:name="T6" style:family="text">
      <style:text-properties fo:color="#434343" fo:font-size="10pt" style:font-size-asian="10pt" style:font-size-complex="10pt"/>
    </style:style>
    <style:style style:name="T7" style:family="text">
      <style:text-properties fo:color="#434343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asoned digital product leader with 15+ years driving innovation across Fortune 500 companies and high-growth startups. Proven track record of scaling design organizations, implementing enterprise-wide digital transformations, and leveraging tech to deliver measurable business impact, including 300% revenue, and 9% recurring revenue growth.</text:span></text:p>
      <text:p text:style-name="P5"/>
      <text:p text:style-name="P3"><text:span text:style-name="T3">PROFESSIONAL EXPERIENCE</text:span></text:p>
      <text:p text:style-name="P2"><text:span text:style-name="T5">THIOSPHERE.ORG / THIOS + COMPANY <text:s/></text:span><text:span text:style-name="T6">Inventor / Founder <text:s text:c="3"/>JULY 2024 - PRESENT</text:span></text:p>
      <text:list xml:id="list2998211858" text:style-name="WWNum5">
        <text:list-item>
          <text:p text:style-name="P8"><text:span text:style-name="T8">Invented modular shelter system for diverse applications, achieving market-ready prototype with comprehensive manufacturing specifications</text:span></text:p>
        </text:list-item>
        <text:list-item>
          <text:p text:style-name="P8"><text:span text:style-name="T8">Mastered advanced design tools (Blender 3D, Plasticity CAD) and fabrication techniques to accelerate product development timeline</text:span></text:p>
        </text:list-item>
        <text:list-item>
          <text:p text:style-name="P8"><text:span text:style-name="T8">Engineered production-ready designs with detailed bill of materials and cost analysis, reducing manufacturing complexity</text:span></text:p>
        </text:list-item>
        <text:list-item>
          <text:p text:style-name="P8"><text:span text:style-name="T8">Integrated multiple AI services using Cursor AI + Claude Code to build automated marketing platforms and business tools</text:span></text:p>
        </text:list-item>
        <text:list-item>
          <text:p text:style-name="P8"><text:span text:style-name="T8">Open-sourced design files to focus on zero-mile farming communities, establishing foundation for sustainable Agrospheres initiative</text:span></text:p>
        </text:list-item>
      </text:list>
      <text:p text:style-name="P6"/>
      <text:p text:style-name="P2"><text:span text:style-name="T5">JOHN DEERE <text:s/></text:span><text:span text:style-name="T6">Senior Lead User Experience, Digital Customer Experience <text:s text:c="3"/>AUGUST 2020 - JULY 2024</text:span></text:p>
      <text:list xml:id="list172526956252914" text:continue-numbering="true" text:style-name="WWNum5">
        <text:list-item>
          <text:p text:style-name="P8"><text:span text:style-name="T8">Orchestrated UX side of enterprise-wide digital customer experience transformation, for all product lines and global markets</text:span></text:p>
        </text:list-item>
        <text:list-item>
          <text:p text:style-name="P8"><text:span text:style-name="T8">Unified global customer authentication and account management systems, increasing logged in user engagement across all digital touchpoints</text:span></text:p>
        </text:list-item>
        <text:list-item>
          <text:p text:style-name="P8"><text:span text:style-name="T8">Part of transition team to Figma, establishing comprehensive global design systems that increased design team velocity significantly</text:span></text:p>
        </text:list-item>
        <text:list-item>
          <text:p text:style-name="P8"><text:span text:style-name="T8">Architected license management system to be deployed across all product lines worldwide, catalyzing 9% increase in recurring revenue</text:span></text:p>
        </text:list-item>
      </text:list>
      <text:p text:style-name="P6"/>
      <text:p text:style-name="P2"><text:span text:style-name="T5">FOURKITES.COM <text:s/></text:span><text:span text:style-name="T6">Head of User Experience <text:s text:c="3"/>JANUARY 2017 - JANUARY 2020</text:span></text:p>
      <text:list xml:id="list404308358" text:style-name="WWNum4">
        <text:list-item>
          <text:p text:style-name="P9"><text:span text:style-name="T8">Scaled design organization from sole practitioner to 10-person team, launching 6 major products that secured Fortune 500 enterprise clients</text:span></text:p>
        </text:list-item>
        <text:list-item>
          <text:p text:style-name="P9"><text:span text:style-name="T8">Established design practice as early employee (#28), implementing processes that supported 300% YoY revenue growth to $100MM annually</text:span></text:p>
        </text:list-item>
        <text:list-item>
          <text:p text:style-name="P9"><text:span text:style-name="T8">Developed comprehensive user research protocols that directly informed product strategy and market positioning</text:span></text:p>
        </text:list-item>
        <text:list-item>
          <text:p text:style-name="P9"><text:span text:style-name="T8">Transformed annual customer conference from 15 to 500+ participants over three years through strategic workshop leadership</text:span></text:p>
        </text:list-item>
      </text:list>
      <text:p text:style-name="P6"/>
      <text:p text:style-name="P2"><text:span text:style-name="T5">MAVENWAVE CONSULTING <text:s/></text:span><text:span text:style-name="T6">Senior Management Consultant / Agile + UX <text:s text:c="3"/>JANUARY 2014 - JANUARY 2017</text:span></text:p>
      <text:list xml:id="list3124278907" text:style-name="WWNum1">
        <text:list-item>
          <text:p text:style-name="P10"><text:span text:style-name="T8">Transformed digital product development for Fortune 500 clients including Abbott, Nike, and OptumRx, delivering projects 10% ahead of schedule</text:span></text:p>
        </text:list-item>
        <text:list-item>
          <text:p text:style-name="P10"><text:span text:style-name="T8">Built and mentored cross-functional design teams using Agile methodologies, consistently exceeding client expectations</text:span></text:p>
        </text:list-item>
        <text:list-item>
          <text:p text:style-name="P10"><text:soft-page-break/><text:span text:style-name="T8">Evangelized Agile principles across enterprise stakeholders, achieving 90% adoption rate across client organizations</text:span></text:p>
        </text:list-item>
      </text:list>
      <text:p text:style-name="P6"/>
      <text:p text:style-name="P2"><text:span text:style-name="T5">NOKIA / HERE MAPS <text:s/></text:span><text:span text:style-name="T6">Product Marketing Manager, HERE Traffic <text:s text:c="3"/>AUGUST 2012 - JANUARY 2014</text:span></text:p>
      <text:list xml:id="list3147899390" text:style-name="WWNum6">
        <text:list-item>
          <text:p text:style-name="P11"><text:span text:style-name="T8">Managed product marketing strategy for real-time traffic platform serving millions of users globally through in-dash GPS systems</text:span></text:p>
        </text:list-item>
        <text:list-item>
          <text:p text:style-name="P11"><text:span text:style-name="T8">Created innovative large display geo data visualizations for OEM partnerships in Europe, Asia, Mideast and Africa</text:span></text:p>
        </text:list-item>
        <text:list-item>
          <text:p text:style-name="P11"><text:span text:style-name="T8">Led integration of acquired Trapster app into HERE Traffic platform, improving user onboarding experience and user engagement</text:span></text:p>
        </text:list-item>
      </text:list>
      <text:p text:style-name="P13"/>
      <text:p text:style-name="P2"><text:span text:style-name="T5">GOGO INFLIGHT INTERNET <text:s/></text:span><text:span text:style-name="T6">Product Manager, Signature Services <text:s text:c="3"/>APRIL 2008 - AUGUST 2012</text:span></text:p>
      <text:list xml:id="list108918838" text:style-name="WWNum3">
        <text:list-item>
          <text:p text:style-name="P12"><text:span text:style-name="T8">Launched inflight connectivity and airborne/terrestrial web services across 6 major airlines as pre-launch product team member</text:span></text:p>
        </text:list-item>
        <text:list-item>
          <text:p text:style-name="P12"><text:span text:style-name="T8">Developed sponsored flight tracker generating recurring revenue streams, functioning independently of flight’s connection status</text:span></text:p>
        </text:list-item>
        <text:list-item>
          <text:p text:style-name="P12"><text:span text:style-name="T8">Pioneered first Agile integration with FAA-proctored manufacturing process, establishing best practices for the company</text:span></text:p>
        </text:list-item>
      </text:list>
      <text:p text:style-name="P4"/>
      <text:p text:style-name="P2"><text:span text:style-name="T3">ADDITIONAL EXPERIENCE</text:span></text:p>
      <text:list xml:id="list903086945" text:style-name="WWNum2">
        <text:list-item>
          <text:p text:style-name="P14"><text:span text:style-name="T9">Co-founder</text:span><text:span text:style-name="T8">, Cognistar.com: Built and managed digital video production teams for online continuing legal education startup</text:span></text:p>
        </text:list-item>
        <text:list-item>
          <text:p text:style-name="P14"><text:span text:style-name="T9">Quality</text:span><text:span text:style-name="T8"> </text:span><text:span text:style-name="T9">Assurance</text:span><text:span text:style-name="T8"> </text:span><text:span text:style-name="T9">Lead</text:span><text:span text:style-name="T8">: Delivered four Super Nintendo games for Life Fitness "Exertainment" platform</text:span></text:p>
        </text:list-item>
        <text:list-item>
          <text:p text:style-name="P14"><text:span text:style-name="T9">Board</text:span><text:span text:style-name="T8"> </text:span><text:span text:style-name="T9">Director</text:span><text:span text:style-name="T8">: 501(c)(3) supporting How Weird Street Faire (howweird.org), 20+ years</text:span></text:p>
        </text:list-item>
        <text:list-item>
          <text:p text:style-name="P14"><text:span text:style-name="T9">Volunteer</text:span><text:span text:style-name="T8"> Instructor: Snowboard instruction for disadvantaged inner city teens (chill.org) for 3 seasons</text:span></text:p>
        </text:list-item>
        <text:list-item>
          <text:p text:style-name="P14"><text:span text:style-name="T9">Entrepreneur</text:span><text:span text:style-name="T8">: Founded skateboard shop at 16, contributing to college funding</text:span></text:p>
        </text:list-item>
      </text:list>
      <text:p text:style-name="P1"/>
      <text:p text:style-name="P3"><text:span text:style-name="T3">CORE COMPETENCIES</text:span></text:p>
      <text:p text:style-name="P15"><text:span text:style-name="T9">Technical Skills:</text:span><text:span text:style-name="T8"> UX/UI Design, Product Management, Agile Methodologies, Design Systems, Figma, Blender 3D, AI Integration</text:span></text:p>
      <text:p text:style-name="P15"><text:span text:style-name="T9">Leadership Skills:</text:span><text:span text:style-name="T8"> Team Scaling, Cross-functional Collaboration, Strategic Vision, Stakeholder Management, Change Management</text:span></text:p>
      <text:p text:style-name="P15"><text:span text:style-name="T9">Industry Expertise:</text:span><text:span text:style-name="T8"> Digital Transformation, Enterprise Software, SaaS Platforms, Customer Experience, Revenue Optimization</text:span></text:p>
      <text:p text:style-name="P16"/>
      <text:p text:style-name="P3"><text:span text:style-name="T3">EDUCATION</text:span></text:p>
      <text:p text:style-name="P2"><text:span text:style-name="T2">Arizona State University</text:span><text:span text:style-name="T1"> Bachelor of Arts, Humanities and Architectural The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8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8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 <text:s text:c="6"/></text:span><text:span text:style-name="MT2">(847) 636-2708 <text:s text:c="2"/>| <text:s text:c="2"/>peter@peterbartsch.com <text:s text:c="2"/>| <text:s text:c="2"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622" meta:character-count="4767" meta:non-whitespace-character-count="4177"/>
    <meta:generator>LibreOfficeDev/6.0.5.2$Linux_X86_64 LibreOffice_project/</meta:generator>
  </office:meta>
</office:document-meta>
</file>