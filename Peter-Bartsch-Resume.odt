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margin-top="0in" fo:margin-bottom="0.0555in" loext:contextual-spacing="false" fo:line-height="100%"/>
    </style:style>
    <style:style style:name="P2" style:family="paragraph" style:parent-style-name="Standard" style:master-page-name="Standard">
      <style:paragraph-properties fo:margin-top="0in" fo:margin-bottom="0.0555in" loext:contextual-spacing="false" fo:line-height="100%" style:page-number="1"/>
    </style:style>
    <style:style style:name="P3" style:family="paragraph" style:parent-style-name="Standard">
      <style:paragraph-properties fo:margin-top="0in" fo:margin-bottom="0.0835in" loext:contextual-spacing="false" fo:line-height="100%"/>
    </style:style>
    <style:style style:name="P4" style:family="paragraph" style:parent-style-name="Standard">
      <style:paragraph-properties fo:margin-top="0.111in" fo:margin-bottom="0.0417in" loext:contextual-spacing="false" fo:line-height="100%"/>
    </style:style>
    <style:style style:name="P5" style:family="paragraph" style:parent-style-name="Standard">
      <style:paragraph-properties fo:margin-top="0.111in" fo:margin-bottom="0.0417in" loext:contextual-spacing="false" fo:line-height="100%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.0972in" fo:margin-bottom="0.028in" loext:contextual-spacing="false" fo:line-height="100%">
        <style:tab-stops>
          <style:tab-stop style:position="7.2in" style:type="right"/>
        </style:tab-stops>
      </style:paragraph-properties>
    </style:style>
    <style:style style:name="P7" style:family="paragraph" style:parent-style-name="Standard">
      <style:paragraph-properties fo:margin-top="0in" fo:margin-bottom="0.0417in" loext:contextual-spacing="false" fo:line-height="100%"/>
    </style:style>
    <style:style style:name="P8" style:family="paragraph" style:parent-style-name="Standard" style:list-style-name="WWNum1">
      <style:paragraph-properties fo:margin-left="0.25in" fo:margin-right="0in" fo:margin-top="0.028in" fo:margin-bottom="0.028in" loext:contextual-spacing="false" fo:line-height="100%" fo:text-align="start" style:justify-single-word="false" fo:keep-together="auto" fo:orphans="2" fo:widows="2" fo:text-indent="-0.1665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top="0.0555in" fo:margin-bottom="0.028in" loext:contextual-spacing="false" fo:line-height="100%">
        <style:tab-stops>
          <style:tab-stop style:position="7.2in" style:type="right"/>
        </style:tab-stops>
      </style:paragraph-properties>
      <style:text-properties fo:font-size="9.5pt" fo:font-weight="bold" style:font-size-asian="9.5pt" style:font-weight-asian="bold" style:font-size-complex="9.5pt" style:font-weight-complex="bold"/>
    </style:style>
    <style:style style:name="P10" style:family="paragraph" style:parent-style-name="Standard">
      <style:paragraph-properties fo:margin-left="0.5in" fo:margin-right="0in" fo:margin-top="0.0555in" fo:margin-bottom="0.028in" loext:contextual-spacing="false" fo:line-height="100%" fo:text-indent="0in" style:auto-text-indent="false">
        <style:tab-stops>
          <style:tab-stop style:position="7.2in" style:type="right"/>
        </style:tab-stops>
      </style:paragraph-properties>
    </style:style>
    <style:style style:name="P11" style:family="paragraph" style:parent-style-name="Standard">
      <style:paragraph-properties fo:margin-left="0.5in" fo:margin-right="0in" fo:margin-top="0.0555in" fo:margin-bottom="0.028in" loext:contextual-spacing="false" fo:line-height="100%" fo:text-indent="0in" style:auto-text-indent="false">
        <style:tab-stops>
          <style:tab-stop style:position="7.2in" style:type="right"/>
        </style:tab-stops>
      </style:paragraph-properties>
      <style:text-properties fo:font-size="9.5pt" fo:font-weight="bold" style:font-size-asian="9.5pt" style:font-weight-asian="bold" style:font-size-complex="9.5pt" style:font-weight-complex="bold"/>
    </style:style>
    <style:style style:name="P12" style:family="paragraph" style:parent-style-name="Standard">
      <style:paragraph-properties fo:margin-left="0.5in" fo:margin-right="0in" fo:margin-top="0.028in" fo:margin-bottom="0.028in" loext:contextual-spacing="false" fo:line-height="100%" fo:text-indent="0in" style:auto-text-indent="false"/>
    </style:style>
    <style:style style:name="P13" style:family="paragraph" style:parent-style-name="Standard">
      <style:paragraph-properties fo:margin-left="0.5in" fo:margin-right="0in" fo:margin-top="0.028in" fo:margin-bottom="0.028in" loext:contextual-spacing="false" fo:line-height="100%" fo:text-indent="0in" style:auto-text-indent="false"/>
      <style:text-properties fo:font-size="9.5pt" fo:font-weight="bold" style:font-size-asian="9.5pt" style:font-weight-asian="bold" style:font-size-complex="9.5pt" style:font-weight-complex="bold"/>
    </style:style>
    <style:style style:name="P14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T1" style:family="text">
      <style:text-properties fo:color="#2d2d2d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2" style:family="text">
      <style:text-properties fo:color="#2d2d2d" style:font-name="Arial" fo:font-size="10pt" style:font-name-asian="Arial1" style:font-size-asian="10pt" style:font-name-complex="Arial1" style:font-size-complex="10pt"/>
    </style:style>
    <style:style style:name="T3" style:family="text">
      <style:text-properties fo:color="#2d2d2d" style:font-name="Arial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T4" style:family="text">
      <style:text-properties fo:color="#2d2d2d" style:font-name="Arial" fo:font-size="9.5pt" fo:font-weight="bold" style:font-name-asian="Arial1" style:font-size-asian="9.5pt" style:font-weight-asian="bold" style:font-name-complex="Arial1" style:font-size-complex="9.5pt" style:font-weight-complex="bold"/>
    </style:style>
    <style:style style:name="T5" style:family="text">
      <style:text-properties fo:color="#2d2d2d" style:font-name="Arial" fo:font-size="9.5pt" fo:font-weight="normal" style:font-name-asian="Arial1" style:font-size-asian="9.5pt" style:font-weight-asian="normal" style:font-name-complex="Arial1" style:font-size-complex="9.5pt" style:font-weight-complex="normal"/>
    </style:style>
    <style:style style:name="T6" style:family="text">
      <style:text-properties fo:color="#555555" style:font-name="Arial" fo:font-size="10pt" style:font-name-asian="Arial1" style:font-size-asian="10pt" style:font-name-complex="Arial1" style:font-size-complex="10pt"/>
    </style:style>
    <style:style style:name="T7" style:family="text">
      <style:text-properties fo:color="#555555" style:font-name="Arial" fo:font-size="9.5pt" fo:font-style="italic" style:font-name-asian="Arial1" style:font-size-asian="9.5pt" style:font-style-asian="italic" style:font-name-complex="Arial1" style:font-size-complex="9.5pt" style:font-style-complex="italic"/>
    </style:style>
    <style:style style:name="T8" style:family="text">
      <style:text-properties fo:color="#555555" style:font-name="Arial" fo:font-size="9.5pt" style:font-name-asian="Arial1" style:font-size-asian="9.5pt" style:font-name-complex="Arial1" style:font-size-complex="9.5pt"/>
    </style:style>
    <style:style style:name="T9" style:family="text">
      <style:text-properties fo:color="#555555" fo:font-size="9pt" style:font-size-asian="9pt" style:font-size-complex="9pt"/>
    </style:style>
    <style:style style:name="T10" style:family="text">
      <style:text-properties fo:color="#888888" style:font-name="Arial" fo:font-size="10pt" style:font-name-asian="Arial1" style:font-size-asian="10pt" style:font-name-complex="Arial1" style:font-size-complex="10pt"/>
    </style:style>
    <style:style style:name="T11" style:family="text">
      <style:text-properties fo:color="#888888" style:font-name="Arial" fo:font-size="9.5pt" style:font-name-asian="Arial1" style:font-size-asian="9.5pt" style:font-name-complex="Arial1" style:font-size-complex="9.5pt"/>
    </style:style>
    <style:style style:name="T12" style:family="text">
      <style:text-properties fo:font-variant="normal" fo:text-transform="none" fo:color="#2d2d2d" style:text-line-through-style="none" style:text-line-through-type="none" style:text-position="0% 100%" style:font-name="Arial" fo:font-size="9.5pt" fo:font-style="normal" style:text-underline-style="none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3" style:family="text">
      <style:text-properties fo:font-variant="normal" fo:text-transform="none" fo:color="#2d2d2d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 style:font-style-complex="normal" style:font-weight-complex="normal"/>
    </style:style>
    <style:style style:name="T14" style:family="text">
      <style:text-properties fo:font-variant="normal" fo:text-transform="none" fo:color="#1155cc" style:text-line-through-style="none" style:text-line-through-type="none" style:text-position="0% 100%" style:font-name="Arial" fo:font-size="9.5pt" fo:font-style="normal" style:text-underline-style="none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text:span text:style-name="T1">Staff / Principal Product Designer — design systems · AI-native workflow. </text:span><text:span text:style-name="T2">Led UX for a $3.8B platform at Deere across web, mobile, and embedded equipment systems (500K users, 12 languages). Built design org 1→10 at FourKites scaling a real-time IoT asset-tracking platform processing 10M+ daily events ($3M→$100M ARR, $1B+ valuation). Now founder of Thios — running an AI-native workflow (Claude, Cursor, Figma Make) to ship a CAD-driven configurator, a dev-grade design system with its own Claude Skill, and physical hardware.</text:span></text:p>
      <text:p text:style-name="P4"><text:span text:style-name="T1">PROFESSIONAL EXPERIENCE</text:span></text:p>
      <text:p text:style-name="P6"><text:a xlink:type="simple" xlink:href="https://thios.co" text:style-name="ListLabel_20_1" text:visited-style-name="ListLabel_20_1"><text:span text:style-name="T3">THIOS (thios.co)</text:span></text:a><text:span text:style-name="T6"> | </text:span><text:span text:style-name="T1">Founder &amp; Lead Designer <text:s/></text:span><text:span text:style-name="T10">Aug 2024 – Present</text:span></text:p>
      <text:p text:style-name="P7"><text:span text:style-name="T7">Open-source modular structures — solo designer, AI-augmented engineering team, 6-surface design system from one source of truth.</text:span></text:p>
      <text:list xml:id="list2819676423" text:style-name="WWNum1">
        <text:list-item>
          <text:p text:style-name="P8"><text:span text:style-name="T12">Shipped a complete product ecosystem solo — 6 sphere variants with CAD models, prototype, and first revenue across every surface.</text:span></text:p>
        </text:list-item>
        <text:list-item>
          <text:p text:style-name="P8"><text:span text:style-name="T12">Designed and built parametric OnShape CAD as the single source of truth driving BOM and the 3D configurator at </text:span><text:a xlink:type="simple" xlink:href="https://thios.co/configurator" text:style-name="ListLabel_20_2" text:visited-style-name="ListLabel_20_2"><text:span text:style-name="T14">thios.co/configurator</text:span></text:a><text:span text:style-name="T12"> — customers manipulate real geometry with full configuration state (valid/invalid combinations, loading, error, empty, BOM hand-off), not marketing renders.</text:span></text:p>
        </text:list-item>
        <text:list-item>
          <text:p text:style-name="P8"><text:span text:style-name="T12">Built a 6-surface, dev-grade design system and published its first Claude Skill (</text:span><text:span text:style-name="T13">audit-design-token-drift</text:span><text:span text:style-name="T12">) — catches design-token drift across canonical surfaces with file:line citations. Design system as dev tooling, not a Figma library nobody opens — </text:span><text:a xlink:type="simple" xlink:href="https://www.thios.co/design-system-architecture.html" text:style-name="ListLabel_20_2" text:visited-style-name="ListLabel_20_2"><text:span text:style-name="T14">thios.co/design-system-architecture.html</text:span></text:a></text:p>
        </text:list-item>
      </text:list>
      <text:p text:style-name="P6"><text:span text:style-name="T15"><text:line-break/></text:span><text:span text:style-name="T1">JOHN DEERE | Senior Lead UX; Digital Customer Experience <text:s/></text:span><text:span text:style-name="T10">Aug 2020 – Jul 2024</text:span></text:p>
      <text:p text:style-name="P7"><text:span text:style-name="T7">Embedded with product teams to modernize 20-year-old systems and drive connected-services revenue across agricultural equipment.</text:span></text:p>
      <text:list xml:id="list152853483765231" text:continue-numbering="true" text:style-name="WWNum1">
        <text:list-item>
          <text:p text:style-name="P8"><text:span text:style-name="T12">Redesigned the license management system for connected ag equipment (Automation/AI services) serving 500K+ users across 12 languages — mapped flows, license states, and edge cases (expired/renewed/transferred/dealer-managed); profile completion 34%→87%, –16% support tickets, enabled $3.8B in connected-services revenue.</text:span></text:p>
        </text:list-item>
        <text:list-item>
          <text:p text:style-name="P8"><text:span text:style-name="T12">Reduced design-to-development time 45% by building the first dev-ready tokens, prop specs, and full state coverage for the enterprise design system in Figma spanning 6 brands and 40+ product teams globally — handoffs that shipped.</text:span></text:p>
        </text:list-item>
        <text:list-item>
          <text:p text:style-name="P8"><text:span text:style-name="T12">Built a unified account and navigation framework deployed across 8 product lines spanning web, mobile, and embedded equipment systems — consolidated fragmented experiences into a single customer view; +28% first-contact resolution on dealer support.</text:span></text:p>
        </text:list-item>
      </text:list>
      <text:p text:style-name="P6"><text:span text:style-name="T15"><text:line-break/></text:span><text:span text:style-name="T1">FOURKITES | Lead UX / Manager <text:s/></text:span><text:span text:style-name="T10">Jan 2017 – Jan 2020</text:span></text:p>
      <text:p text:style-name="P7"><text:span text:style-name="T7">Employee #28 during hypergrowth, $3M → $100M ARR ($1B+ valuation). Built the design function from scratch — founding designer to a 10-person global team.</text:span></text:p>
      <text:list xml:id="list152854724119338" text:continue-numbering="true" text:style-name="WWNum1">
        <text:list-item>
          <text:p text:style-name="P8"><text:span text:style-name="T12">Designed flagship IoT asset-tracking platform 0→1 — real-time supply chain control tower (web) and mobile apps processing 10M+ daily GPS/telematics events for 30+ Fortune 2000 customers (Anheuser-Busch, Georgia-Pacific, Tyson); high-density dashboards with map, list, and timeline views became the primary driver of 3x customer expansion.</text:span></text:p>
        </text:list-item>
        <text:list-item>
          <text:p text:style-name="P8"><text:span text:style-name="T12">Led predictive analytics dashboards (data viz, anomaly states, alerting workflows) that identified shipment delays 6–12 hours earlier than competitors; +41% retention, +$120K avg ACV.</text:span></text:p>
        </text:list-item>
        <text:list-item>
          <text:p text:style-name="P8"><text:span text:style-name="T12">Scaled the design org across Chicago and Chennai embedded in engineering sprint cadence; established component library, design ops, and hiring framework; –65% one-off component variants while maintaining startup velocity.</text:span></text:p>
        </text:list-item>
      </text:list>
      <text:p text:style-name="P6"><text:span text:style-name="T15"><text:line-break/></text:span><text:span text:style-name="T1">MAVENWAVE PARTNERS | Senior UX + Agile Lead <text:s/></text:span><text:span text:style-name="T10">Jan 2014 – Jan 2017</text:span></text:p>
      <text:p text:style-name="P7"><text:span text:style-name="T7">Led digital product design for Fortune 500 healthcare and pharma clients.</text:span></text:p>
      <text:list xml:id="list152854352691539" text:continue-numbering="true" text:style-name="WWNum1">
        <text:list-item>
          <text:p text:style-name="P8"><text:span text:style-name="T12">Designed 6 internal portals for AbbVie supporting 200K+ users across clinical trials and patient support programs — improved medication adherence tracking, –12% hospital readmissions.</text:span></text:p>
        </text:list-item>
        <text:list-item>
          <text:p text:style-name="P8"><text:span text:style-name="T12">Rebuilt OptumRx pharmacy formulary platform processing 1.4B prescriptions annually; created the company's first patient-facing product — –15% drug-interaction–related fulfillment errors.</text:span></text:p>
        </text:list-item>
        <text:list-item>
          <text:p text:style-name="P8"><text:span text:style-name="T12">Established Lean UX and Agile/sprint-cadence practices across client engagements while mentoring junior designers and leading cross-functional design sprints.</text:span></text:p>
        </text:list-item>
      </text:list>
      <text:p text:style-name="P5"/>
      <text:p text:style-name="P4"><text:span text:style-name="T1">EARLIER EXPERIENCE</text:span></text:p>
      <text:p text:style-name="P9"><text:soft-page-break/></text:p>
      <text:p text:style-name="P10"><text:span text:style-name="T4">NOKIA / HERE MAPS | </text:span><text:span text:style-name="T8">Product Marketing Manager, HERE Traffic | GPS probe visualizations, real-time vehicle-telematics data products, and go-to-market for DEMPSY (open-source distributed computing). <text:s/></text:span><text:span text:style-name="T11">Aug 2012 – Jan 2014</text:span></text:p>
      <text:p text:style-name="P11"/>
      <text:p text:style-name="P10"><text:span text:style-name="T4">GOGO INFLIGHT INTERNET | </text:span><text:span text:style-name="T8">Product Manager – Signature Services | Launched in-flight internet across major US airlines; onboard hardware UX + Air-to-Ground RF network; FAA-approved documentation; 0→1 in-flight tracker driving sponsorship deals. <text:s/></text:span><text:span text:style-name="T11">Apr 2008 – Aug 2012</text:span></text:p>
      <text:p text:style-name="P5"/>
      <text:p text:style-name="P4"><text:span text:style-name="T1">SKILLS</text:span><text:span text:style-name="T15"><text:line-break/></text:span></text:p>
      <text:p text:style-name="P12"><text:span text:style-name="T4">UX Systems: </text:span><text:span text:style-name="T8">User flows · journey mapping · IA · interaction design · state management · edge-case coverage (idle/loading/success/error/empty) · information density · dashboards · enterprise design systems · design tokens · accessibility (WCAG 2.1)</text:span></text:p>
      <text:p text:style-name="P13"/>
      <text:p text:style-name="P12"><text:span text:style-name="T4">Research &amp; Methods: </text:span><text:span text:style-name="T8">User interviews · usability testing · design sprints · Lean UX · Agile/Scrum sprint cadence · PRD/RFC participation</text:span></text:p>
      <text:p text:style-name="P13"/>
      <text:p text:style-name="P12"><text:span text:style-name="T4">AI-Native Workflow: </text:span><text:span text:style-name="T8">Claude (incl. authoring custom Claude Skill) · Cursor · Figma Make · Adobe Firefly · Midjourney · Obsidian as knowledge base</text:span></text:p>
      <text:p text:style-name="P13"/>
      <text:p text:style-name="P12"><text:span text:style-name="T4">Tools: </text:span><text:span text:style-name="T8">Figma · OnShape CAD · Blender 3D · HTML/CSS · Adobe Creative Suite</text:span></text:p>
      <text:p text:style-name="P4"/>
      <text:p text:style-name="P4"/>
      <text:p text:style-name="P4"><text:span text:style-name="T1">EDUCATION</text:span></text:p>
      <text:p text:style-name="P14"><text:span text:style-name="T5">Arizona State University <text:s/>| <text:s/>Bachelor of Arts, Humanities and Architectural Theory</text:span></text:p>
      <text:p text:style-name="P5"/>
      <text:p text:style-name="P5"/>
      <text:p text:style-name="P4"><text:span text:style-name="T1">COMMUNITY</text:span></text:p>
      <text:p text:style-name="P14"><text:span text:style-name="T5">Member, Board of Directors <text:s/>| <text:s/>How Weird Street Faire 501(c)(3), San Francisco <text:s/>| <text:s/>2000 – 202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2d2d2d" style:font-name="Arial" fo:font-size="10pt" fo:language="en" fo:country="US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2d2d2d" style:font-name="Arial" fo:font-size="10pt" fo:language="en" fo:country="US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e74b5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 style:font-style-complex="normal" style:font-weight-complex="normal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e74b5" style:text-line-through-style="none" style:text-line-through-type="none" style:text-position="0% 100%" style:font-name="Arial" fo:font-family="Arial" style:font-family-generic="roman" style:font-pitch="variable" fo:font-size="13pt" fo:font-style="normal" style:text-underline-style="none" fo:font-weight="normal" style:font-name-asian="Arial1" style:font-family-asian="Arial" style:font-family-generic-asian="system" style:font-pitch-asian="variable" style:font-size-asian="13pt" style:font-style-asian="normal" style:font-weight-asian="normal" style:font-name-complex="Arial1" style:font-family-complex="Arial" style:font-family-generic-complex="system" style:font-pitch-complex="variable" style:font-size-complex="13pt" style:font-style-complex="normal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1f4d78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e74b5" style:text-line-through-style="none" style:text-line-through-type="none" style:text-position="0% 100%" style:font-name="Arial" fo:font-family="Arial" style:font-family-generic="roman" style:font-pitch="variable" fo:font-size="10pt" fo:font-style="italic" style:text-underline-style="none" fo:font-weight="normal" style:font-name-asian="Arial1" style:font-family-asian="Arial" style:font-family-generic-asian="system" style:font-pitch-asian="variable" style:font-size-asian="10pt" style:font-style-asian="italic" style:font-weight-asian="normal" style:font-name-complex="Arial1" style:font-family-complex="Arial" style:font-family-generic-complex="system" style:font-pitch-complex="variable" style:font-size-complex="10pt" style:font-style-complex="italic" style:font-weight-complex="normal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e74b5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style:font-style-complex="normal" style:font-weight-complex="normal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1f4d78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style:font-style-complex="normal" style:font-weight-complex="normal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d2d2d" style:text-line-through-style="none" style:text-line-through-type="none" style:text-position="0% 100%" style:font-name="Arial" fo:font-family="Arial" style:font-family-generic="roman" style:font-pitch="variable" fo:font-size="28pt" fo:font-style="normal" style:text-underline-style="none" fo:font-weight="normal" style:font-name-asian="Arial1" style:font-family-asian="Arial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2d2d2d" style:font-name="Arial" fo:font-family="Arial" style:font-family-generic="roman" style:font-pitch="variable" fo:font-size="10pt" style:text-underline-style="none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font-variant="normal" fo:text-transform="none" fo:color="#1155cc" style:text-line-through-style="none" style:text-line-through-type="none" style:text-position="0% 100%" style:font-name="Arial" fo:font-family="Arial" style:font-family-generic="roman" style:font-pitch="variable" fo:font-size="9.5pt" fo:font-style="normal" style:text-underline-style="none" fo:font-weight="normal" style:font-name-asian="Arial1" style:font-family-asian="Arial" style:font-family-generic-asian="system" style:font-pitch-asian="variable" style:font-size-asian="9.5pt" style:font-style-asian="normal" style:font-weight-asian="normal" style:font-name-complex="Arial1" style:font-family-complex="Arial" style:font-family-generic-complex="system" style:font-pitch-complex="variable" style:font-size-complex="9.5pt" style:font-style-complex="normal" style:font-weight-complex="normal"/>
    </style:style>
    <style:style style:name="ListLabel_20_3" style:display-name="ListLabel 3" style:family="text">
      <style:text-properties fo:color="#555555" fo:font-size="9pt" style:font-size-asian="9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1665in" fo:margin-left="0.25in"/>
        </style:list-level-properties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.0417in" loext:contextual-spacing="false" fo:line-height="100%"/>
    </style:style>
    <style:style style:name="MP2" style:family="paragraph" style:parent-style-name="Standard">
      <style:paragraph-properties fo:margin-top="0in" fo:margin-bottom="0.0555in" loext:contextual-spacing="false" fo:line-height="100%"/>
    </style:style>
    <style:style style:name="MT1" style:family="text">
      <style:text-properties fo:font-size="18pt" fo:font-weight="bold" style:font-size-asian="18pt" style:font-weight-asian="bold" style:font-size-complex="18pt" style:font-weight-complex="bold"/>
    </style:style>
    <style:style style:name="MT2" style:family="text">
      <style:text-properties fo:color="#555555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4917in" fo:margin-bottom="0.65in" fo:margin-left="0.65in" fo:margin-right="0.65in" style:writing-mode="lr-tb" style:layout-grid-color="#c0c0c0" style:layout-grid-lines="246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83in" fo:margin-left="0in" fo:margin-right="0in" fo:margin-bottom="0.118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eter Bartsch</text:span></text:p>
        <text:p text:style-name="MP2"><text:span text:style-name="MT2">(847) 636-2708 <text:s/>| <text:s/></text:span><text:a xlink:type="simple" xlink:href="mailto:peter@peterbartsch.com" text:style-name="ListLabel_20_3" text:visited-style-name="ListLabel_20_3"><text:span text:style-name="MT2">peter@peterbartsch.com</text:span></text:a><text:span text:style-name="MT2"> <text:s/>| <text:s/>portfolio: </text:span><text:a xlink:type="simple" xlink:href="https://peterbartsch.com" text:style-name="ListLabel_20_3" text:visited-style-name="ListLabel_20_3"><text:span text:style-name="MT2">peterbartsch.com</text:span></text:a><text:span text:style-name="MT2"> <text:s/>| <text:s/></text:span><text:a xlink:type="simple" xlink:href="https://linkedin.com/in/peterbartsch" text:style-name="ListLabel_20_3" text:visited-style-name="ListLabel_20_3"><text:span text:style-name="MT2">linkedin.com/in/peterbartsch</text:span>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6" meta:word-count="754" meta:character-count="5496" meta:non-whitespace-character-count="4748"/>
    <meta:generator>LibreOfficeDev/6.0.5.2$Linux_X86_64 LibreOffice_project/</meta:generator>
  </office:meta>
</office:document-meta>
</file>