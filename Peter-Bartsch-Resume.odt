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-0.4374in" fo:margin-right="-0.5in" fo:text-indent="0in" style:auto-text-indent="false"/>
    </style:style>
    <style:style style:name="P2" style:family="paragraph" style:parent-style-name="Standard">
      <style:paragraph-properties fo:margin-left="-0.4374in" fo:margin-right="-0.5in" fo:text-indent="0in" style:auto-text-indent="false"/>
      <style:text-properties fo:font-size="10pt" style:font-size-asian="10pt" style:font-size-complex="10pt"/>
    </style:style>
    <style:style style:name="P3" style:family="paragraph" style:parent-style-name="Standard" style:list-style-name="WWNum5">
      <style:paragraph-properties fo:margin-left="-0.4374in" fo:margin-right="-0.5in" fo:text-indent="0in" style:auto-text-indent="false"/>
    </style:style>
    <style:style style:name="P4" style:family="paragraph" style:parent-style-name="Standard" style:list-style-name="WWNum7">
      <style:paragraph-properties fo:margin-left="-0.4374in" fo:margin-right="-0.5in" fo:text-indent="0in" style:auto-text-indent="false"/>
    </style:style>
    <style:style style:name="P5" style:family="paragraph" style:parent-style-name="Standard" style:list-style-name="WWNum4">
      <style:paragraph-properties fo:margin-left="-0.4374in" fo:margin-right="-0.5in" fo:text-indent="0in" style:auto-text-indent="false"/>
    </style:style>
    <style:style style:name="P6" style:family="paragraph" style:parent-style-name="Standard" style:list-style-name="WWNum1">
      <style:paragraph-properties fo:margin-left="-0.4374in" fo:margin-right="-0.5in" fo:text-indent="0in" style:auto-text-indent="false"/>
    </style:style>
    <style:style style:name="P7" style:family="paragraph" style:parent-style-name="Standard" style:list-style-name="WWNum6">
      <style:paragraph-properties fo:margin-left="-0.4374in" fo:margin-right="-0.5in" fo:text-indent="0in" style:auto-text-indent="false"/>
    </style:style>
    <style:style style:name="P8" style:family="paragraph" style:parent-style-name="Standard" style:list-style-name="WWNum3">
      <style:paragraph-properties fo:margin-left="-0.4374in" fo:margin-right="-0.5in" fo:text-indent="0in" style:auto-text-indent="false"/>
    </style:style>
    <style:style style:name="P9" style:family="paragraph" style:parent-style-name="Standard" style:list-style-name="WWNum2">
      <style:paragraph-properties fo:margin-left="-0.4374in" fo:margin-right="-0.5in" fo:text-indent="0in" style:auto-text-indent="false"/>
    </style:style>
    <style:style style:name="P10" style:family="paragraph" style:parent-style-name="Standard" style:master-page-name="Standard">
      <style:paragraph-properties fo:margin-left="-0.4374in" fo:margin-right="-0.5in" fo:text-indent="0in" style:auto-text-indent="false" style:page-number="1"/>
    </style:style>
    <style:style style:name="P11" style:family="paragraph" style:parent-style-name="Standard">
      <style:paragraph-properties fo:margin-left="0.5in" fo:margin-right="-0.5in" fo:text-indent="0in" style:auto-text-indent="false"/>
      <style:text-properties fo:font-size="9pt" style:font-size-asian="9pt" style:font-size-complex="9pt"/>
    </style:style>
    <style:style style:name="P12" style:family="paragraph" style:parent-style-name="Heading_20_2">
      <style:paragraph-properties fo:margin-left="-0.4374in" fo:margin-right="0in" fo:text-indent="0in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color="#999999" fo:font-weight="bold" style:font-weight-asian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A visionary product leader who transforms complex challenges into elegant solutions. With over 20 years of experience, <text:s/>spanning startups to Fortune 500 companies, I bring strategic vision and hands-on leadership to organizations ready for change. Known for building high-performing teams and delivering results that drive business growth.</text:span></text:p>
      <text:p text:style-name="P2"/>
      <text:p text:style-name="P1"><text:span text:style-name="T3">EXPERIENCE</text:span></text:p>
      <text:p text:style-name="P1"><text:span text:style-name="T2">THIOSPHERE.ORG / THIOS.CO</text:span></text:p>
      <text:p text:style-name="P1"><text:span text:style-name="T1">Inventor | July 2024 - Present</text:span></text:p>
      <text:list xml:id="list727579521" text:style-name="WWNum5">
        <text:list-item>
          <text:p text:style-name="P3"><text:span text:style-name="T4">Pioneering an open-source modular shelter system</text:span></text:p>
        </text:list-item>
        <text:list-item>
          <text:p text:style-name="P3"><text:span text:style-name="T4">Leading end-to-end product development of the initial product, the Saunosphere, from concept to manufacturing</text:span></text:p>
        </text:list-item>
        <text:list-item>
          <text:p text:style-name="P3"><text:span text:style-name="T4">Establishing scalable production methodologies for diverse Thiosphere applications globally</text:span></text:p>
        </text:list-item>
      </text:list>
      <text:p text:style-name="P2"/>
      <text:p text:style-name="P1"><text:span text:style-name="T2">JOHN DEERE AND COMPANY</text:span></text:p>
      <text:p text:style-name="P1"><text:span text:style-name="T1">Senior Lead UX, Digital Customer Experience | August 2020 - July 2024</text:span></text:p>
      <text:list xml:id="list1911206360" text:style-name="WWNum7">
        <text:list-item>
          <text:p text:style-name="P4"><text:span text:style-name="T4">Led digital transformation initiative that increased global recurring revenue by creating seamless self-service experiences</text:span></text:p>
        </text:list-item>
        <text:list-item>
          <text:p text:style-name="P4"><text:span text:style-name="T4">Unified global customer authentication and account management, establishing consistent experience across all markets</text:span></text:p>
        </text:list-item>
        <text:list-item>
          <text:p text:style-name="P4"><text:span text:style-name="T4">Guided enterprise-wide transition to modern design tools and practices, improving team efficiency and product quality</text:span></text:p>
        </text:list-item>
        <text:list-item>
          <text:p text:style-name="P4"><text:span text:style-name="T4">Architected license management platform now used across multiple product lines worldwide</text:span></text:p>
        </text:list-item>
      </text:list>
      <text:p text:style-name="P2"/>
      <text:p text:style-name="P1"><text:span text:style-name="T2">FOURKITES</text:span></text:p>
      <text:p text:style-name="P1"><text:span text:style-name="T1">Head of UX Design | January 2017 - January 2020</text:span></text:p>
      <text:list xml:id="list1521644811" text:style-name="WWNum4">
        <text:list-item>
          <text:p text:style-name="P5"><text:span text:style-name="T4">Grew design organization from sole practitioner to team of 10, launching 6 major products that secured key enterprise clients</text:span></text:p>
        </text:list-item>
        <text:list-item>
          <text:p text:style-name="P5"><text:span text:style-name="T4">Built design practice from ground up as early employee (#28), establishing processes that scaled with rapid company growth</text:span></text:p>
        </text:list-item>
        <text:list-item>
          <text:p text:style-name="P5"><text:span text:style-name="T4">Created and implemented design system that supported 300% year-over-year product growth</text:span></text:p>
        </text:list-item>
        <text:list-item>
          <text:p text:style-name="P5"><text:span text:style-name="T4">Led customer workshops at annual conference, growing attendance from 50 to 500+ participants</text:span></text:p>
        </text:list-item>
      </text:list>
      <text:p text:style-name="P2"/>
      <text:p text:style-name="P1"><text:span text:style-name="T2">MAVENWAVE PARTNERS</text:span></text:p>
      <text:p text:style-name="P1"><text:span text:style-name="T1">Senior Management Consultant | January 2014 - January 2017</text:span></text:p>
      <text:list xml:id="list4227023971" text:style-name="WWNum1">
        <text:list-item>
          <text:p text:style-name="P6"><text:soft-page-break/><text:span text:style-name="T4">Transformed digital product development for Fortune 500 clients including Abbott, Nike, and OptumRx</text:span></text:p>
        </text:list-item>
        <text:list-item>
          <text:p text:style-name="P6"><text:span text:style-name="T4">Built and mentored cross-functional teams that consistently delivered ahead of schedule</text:span></text:p>
        </text:list-item>
        <text:list-item>
          <text:p text:style-name="P6"><text:span text:style-name="T4">Expanded client engagements through demonstrated value and strategic partnership</text:span></text:p>
        </text:list-item>
      </text:list>
      <text:p text:style-name="P2"/>
      <text:p text:style-name="P1"><text:span text:style-name="T2">NOKIA / HERE MAPS</text:span></text:p>
      <text:p text:style-name="P1"><text:span text:style-name="T1">Product Marketing Manager | August 2012 - January 2014</text:span></text:p>
      <text:list xml:id="list4260681728" text:style-name="WWNum6">
        <text:list-item>
          <text:p text:style-name="P7"><text:span text:style-name="T4">Directed product strategy for real-time traffic platform serving millions of users globally</text:span></text:p>
        </text:list-item>
        <text:list-item>
          <text:p text:style-name="P7"><text:span text:style-name="T4">Created innovative data visualization tools that helped secure major automotive partnerships</text:span></text:p>
        </text:list-item>
      </text:list>
      <text:p text:style-name="P11"/>
      <text:p text:style-name="P1"><text:span text:style-name="T2">GOGO INFLIGHT INTERNET</text:span></text:p>
      <text:p text:style-name="P1"><text:span text:style-name="T1">Product Manager | April 2008 - August 2012</text:span></text:p>
      <text:list xml:id="list3947988730" text:style-name="WWNum3">
        <text:list-item>
          <text:p text:style-name="P8"><text:span text:style-name="T4">Joined pre-launch team that scaled service across major US airlines</text:span></text:p>
        </text:list-item>
        <text:list-item>
          <text:p text:style-name="P8"><text:span text:style-name="T4">Created revenue-generating inflight products including sponsored flight tracker</text:span></text:p>
        </text:list-item>
        <text:list-item>
          <text:p text:style-name="P8"><text:span text:style-name="T4">Pioneered social media integration programs that increased user engagement</text:span></text:p>
        </text:list-item>
      </text:list>
      <text:p text:style-name="P2"/>
      <text:p text:style-name="P1"><text:span text:style-name="T2">EARLIER EXPERIENCE</text:span></text:p>
      <text:list xml:id="list3744479701" text:style-name="WWNum2">
        <text:list-item>
          <text:p text:style-name="P9"><text:span text:style-name="T4">Co-founder of two successful digital media startups</text:span></text:p>
        </text:list-item>
        <text:list-item>
          <text:p text:style-name="P9"><text:span text:style-name="T4">Led production teams creating online education content</text:span></text:p>
        </text:list-item>
        <text:list-item>
          <text:p text:style-name="P9"><text:span text:style-name="T4">Early innovator in e-commerce and digital product visualization</text:span></text:p>
        </text:list-item>
      </text:list>
      <text:p text:style-name="P2"/>
      <text:p text:style-name="P1"><text:span text:style-name="T1">EDUCATION</text:span></text:p>
      <text:p text:style-name="P1"><text:span text:style-name="T2">Arizona State University</text:span></text:p>
      <text:p text:style-name="P1"><text:span text:style-name="T1">B.A. Humanities: Architectural Theo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9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9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9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9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9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9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9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2">
      <style:paragraph-properties fo:margin-left="-0.4374in" fo:margin-right="0in" fo:text-indent="0in" style:auto-text-indent="false"/>
    </style:style>
    <style:style style:name="MT1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 text:name="_v1qdw49vp2i"/><text:span text:style-name="MT1">Peter Bartsch <text:s text:c="11"/>(847) 636-2708 <text:s text:c="7"/>peter@peterbartsch.co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1" meta:word-count="404" meta:character-count="2896" meta:non-whitespace-character-count="2536"/>
    <meta:generator>LibreOfficeDev/6.0.5.2$Linux_X86_64 LibreOffice_project/</meta:generator>
  </office:meta>
</office:document-meta>
</file>