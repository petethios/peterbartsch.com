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-0.4374in" fo:margin-right="-0.4327in" fo:margin-top="0.1665in" fo:margin-bottom="0.1665in" loext:contextual-spacing="false" fo:line-height="100%" fo:text-align="justify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indent="0in" style:auto-text-indent="false" style:page-number="1"/>
    </style:style>
    <style:style style:name="P4" style:family="paragraph" style:parent-style-name="Standard">
      <style:paragraph-properties fo:margin-left="-0.4374in" fo:margin-right="-0.5in" fo:text-indent="0in" style:auto-text-indent="false"/>
    </style:style>
    <style:style style:name="P5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666666"/>
    </style:style>
    <style:style style:name="P7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8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999999"/>
    </style:style>
    <style:style style:name="P9" style:family="paragraph" style:parent-style-name="Standard" style:list-style-name="WWNum3">
      <style:paragraph-properties fo:margin-left="0.5in" fo:margin-right="-0.4327in" fo:margin-top="0.1665in" fo:margin-bottom="0in" loext:contextual-spacing="fals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-0.4327in" fo:margin-top="0.1665in" fo:margin-bottom="0in" loext:contextual-spacing="fals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-0.4327in" fo:margin-top="0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-0.4327in" fo:margin-top="0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-0.4327in" fo:margin-top="0in" fo:margin-bottom="0.1665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-0.4327in" fo:margin-top="0in" fo:margin-bottom="0.1665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-0.25in" fo:margin-top="0.1665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-0.25in" fo:margin-top="0in" fo:margin-bottom="0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1">
      <style:paragraph-properties fo:margin-left="0.5in" fo:margin-right="-0.25in" fo:margin-top="0in" fo:margin-bottom="0.1665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1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2" style:family="paragraph" style:parent-style-name="Standard">
      <style:paragraph-properties fo:margin-left="0.25in" fo:margin-right="-0.5in" fo:text-indent="-0.6874in" style:auto-text-indent="false"/>
    </style:style>
    <style:style style:name="P23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color="#999999"/>
    </style:style>
    <style:style style:name="T3" style:family="text">
      <style:text-properties fo:color="#999999"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34343"/>
    </style:style>
    <style:style style:name="T6" style:family="text">
      <style:text-properties fo:color="#434343" style:text-underline-style="none"/>
    </style:style>
    <style:style style:name="T7" style:family="text">
      <style:text-properties fo:color="#434343" fo:font-weight="bold" style:font-weight-asian="bold" style:font-weight-complex="bold"/>
    </style:style>
    <style:style style:name="T8" style:family="text">
      <style:text-properties fo:color="#434343" fo:font-size="10pt" style:font-size-asian="10pt" style:font-size-complex="10pt"/>
    </style:style>
    <style:style style:name="T9" style:family="text">
      <style:text-properties fo:color="#434343" fo:font-size="12pt" style:font-size-asian="12pt" style:font-size-complex="12pt"/>
    </style:style>
    <style:style style:name="T10" style:family="text">
      <style:text-properties fo:color="#434343" fo:font-size="13pt" style:font-size-asian="13pt" style:font-size-complex="13pt"/>
    </style:style>
    <style:style style:name="T11" style:family="text">
      <style:text-properties style:text-underline-style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duct designer specializing in enterprise design systems and complex data products. 15 years hands-on work—from solo IC at $3M startup to senior designer at $38B enterprise. Research, prototyping, systematic design, and occasional team building along the way.</text:p>
      <text:p text:style-name="P5"><text:line-break/><text:span text:style-name="T2">PROFESSIONAL EXPERIENCE</text:span></text:p>
      <text:p text:style-name="P2"><text:span text:style-name="T4">THIOS | Founder &amp; Lead Designer</text:span> | Aug 2024 - Present <text:line-break/>Open-source modular shelter system that transforms parking spaces into productive environments—from saunas to urban farms.</text:p>
      <text:list xml:id="list4151814304" text:style-name="WWNum3">
        <text:list-item>
          <text:p text:style-name="P9"><text:span text:style-name="T4">Designed and built complete product ecosystem from 0→1</text:span>: <text:span text:style-name="T5">5 modular shelter variants with full CAD/3D models (OnShape), physical working prototype, web platform, and multi-tier business model—leveraging AI tools (Claude, Cursor) as technical co-founder to accelerate development across design, engineering, and strategy</text:span></text:p>
        </text:list-item>
        <text:list-item>
          <text:p text:style-name="P11"><text:span text:style-name="T4">Launched first revenue-generating product</text:span>:<text:span text:style-name="T5"> Whole Thiosphere Handbook—200+ page build guide with architectural drawings, cut lists, and assembly instructions, targeting 2,000 early customers with lifetime updates</text:span></text:p>
        </text:list-item>
        <text:list-item>
          <text:p text:style-name="P13"><text:span text:style-name="T4">Applied AI-augmented workflows</text:span><text:span text:style-name="T5"> across entire development cycle—concept validation, CAD modeling, web development, technical documentation—demonstrating practical AI integration as force multiplier for product development<text:line-break/></text:span></text:p>
        </text:list-item>
      </text:list>
      <text:p text:style-name="P2"><text:span text:style-name="T4">JOHN DEERE | Senior Lead UX; Digital Customer Experience</text:span> | Aug 2020 - Jul 2024 <text:line-break/>Led UX modernization across enterprise digital products serving agricultural, construction, and forestry markets globally. Embedded with product teams to establish design standards and drive subscription revenue growth.</text:p>
      <text:list xml:id="list150458251609836" text:continue-numbering="true" text:style-name="WWNum3">
        <text:list-item>
          <text:p text:style-name="P9"><text:span text:style-name="T4">Redesigned 20-year-old license management system</text:span><text:span text:style-name="T5"> serving 500K+ users across 12 languages, increasing authenticated engagement 34% and reducing support tickets 16%—enabling $3.8B in subscription revenue from Automation and AI services</text:span></text:p>
        </text:list-item>
        <text:list-item>
          <text:p text:style-name="P11"><text:span text:style-name="T4">Created unified account and navigation framework</text:span><text:span text:style-name="T5"> deployed across all digital touchpoints (web, mobile, embedded) for 8 product lines—consolidated fragmented experiences into single customer view with equipment data, improving dealer support efficiency 28%</text:span></text:p>
        </text:list-item>
        <text:list-item>
          <text:p text:style-name="P13"><text:span text:style-name="T4">Established enterprise design system</text:span> <text:span text:style-name="T5">in Figma spanning 6 brands and 40+ product teams globally, reducing design-to-development handoff time 45% through standardized components and documentation<text:line-break/></text:span></text:p>
        </text:list-item>
      </text:list>
      <text:p text:style-name="P1"><text:span text:style-name="T4">FOURKITES | Lead UX / Manager</text:span> | Jan 2017 - Jan 2020<text:line-break/>Employee #28 at supply chain visibility startup during hypergrowth ($3M to $100M ARR). Built and led design function from founding designer to 10-person global team.</text:p>
      <text:list xml:id="list2391764772" text:style-name="WWNum1">
        <text:list-item>
          <text:p text:style-name="P15"><text:span text:style-name="T4">Designed real-time supply chain control tower</text:span><text:span text:style-name="T5"> processing 10M+ daily tracking events for 30+ Fortune 2000 companies (Anheuser-Busch, Georgia-Pacific, Tyson Foods)—became company's flagship product driving 3x customer expansion</text:span></text:p>
        </text:list-item>
        <text:list-item>
          <text:p text:style-name="P16"><text:span text:style-name="T4">Led predictive analytics dashboard</text:span><text:span text:style-name="T5"> that identified shipment delays 6-12 hours earlier than competitors, increasing customer retention 41% and expanding average contract value $120K annually</text:span></text:p>
        </text:list-item>
        <text:list-item>
          <text:p text:style-name="P17"><text:span text:style-name="T4">Scaled design team from 1 to 10</text:span><text:span text:style-name="T5"> across Chicago and Chennai offices while establishing hiring framework, design operations, and component library that reduced design inconsistencies 65%</text:span></text:p>
        </text:list-item>
      </text:list>
      <text:p text:style-name="P18"><text:span text:style-name="T4"><text:line-break/>MAVENWAVE PARTNERS | Senior UX + Agile Lead (Consultant)</text:span> | Jan 2014 - Jan 2017 <text:line-break/>Led UX and Agile transformation for Fortune 500 digital products across healthcare and pharmaceutical sectors.</text:p>
      <text:list xml:id="list361214978" text:style-name="WWNum4">
        <text:list-item>
          <text:p text:style-name="P10"><text:span text:style-name="T4">Designed 6 internal portals for AbbVie</text:span><text:span text:style-name="T5"> supporting 200K+ users across clinical trials and patient support programs—improved medication adherence tracking and reduced hospital readmissions 12% through simplified workflows</text:span></text:p>
        </text:list-item>
        <text:list-item>
          <text:p text:style-name="P12"><text:span text:style-name="T4">Rebuilt OptumRx pharmacy formulary platform</text:span><text:span text:style-name="T5"> processing 1.4B prescriptions annually—created company's first patient-facing product, reducing fulfillment errors 15% through improved drug interaction warnings and onboarding</text:span></text:p>
        </text:list-item>
        <text:list-item>
          <text:p text:style-name="P14"><text:span text:style-name="T4">Established Lean UX and Agile practices</text:span><text:span text:style-name="T5"> across client engagements while mentoring junior designers and leading cross-functional design sprints</text:span></text:p>
        </text:list-item>
      </text:list>
      <text:p text:style-name="P6"/>
      <text:p text:style-name="P6"/>
      <text:p text:style-name="P7"><text:span text:style-name="T2">EARLIER EXPERIENCE | 2001 - 2014</text:span></text:p>
      <text:list xml:id="list2044311168" text:style-name="WWNum2">
        <text:list-item>
          <text:p text:style-name="P19"><text:span text:style-name="T7">Nokia HERE Maps</text:span><text:span text:style-name="T5"> | Product Marketing Manager (2012-2014) - Led UX integration of acquired Trapster app, improving onboarding completion 33%<text:line-break/></text:span></text:p>
        </text:list-item>
        <text:list-item>
          <text:p text:style-name="P20"><text:span text:style-name="T7">Gogo Inflight WiFi</text:span><text:span text:style-name="T5"> | Product Manager (2008-2012) - Launched connectivity services across 6 major airlines; developed sponsored flight tracker generating recurring revenue streams<text:line-break/></text:span></text:p>
        </text:list-item>
        <text:list-item>
          <text:p text:style-name="P21"><text:span text:style-name="T7">Cognistar</text:span><text:span text:style-name="T5"> | Co-Founder (2001-2008) - Built digital production and UX for legal education startup; raised $3M, achieved $2M+ annual revenue before acquisition</text:span></text:p>
        </text:list-item>
      </text:list>
      <text:p text:style-name="P7"><text:span text:style-name="T2">SKILLS</text:span><text:span text:style-name="T3"><text:line-break/></text:span><text:span text:style-name="T7">Design Leadership:</text:span><text:span text:style-name="T8"> Enterprise Design Systems • Cross-functional Team Building • Design Operations • Information Architecture • Data Visualization • Accessibility (WCAG 2.1)</text:span></text:p>
      <text:p text:style-name="P7"><text:soft-page-break/><text:span text:style-name="T7">Research &amp; Strategy:</text:span><text:span text:style-name="T8"> User Research • Usability Testing • Journey Mapping • Design Sprints • Lean UX • Agile/Scrum</text:span></text:p>
      <text:p text:style-name="P7"><text:span text:style-name="T7">Tools:</text:span><text:span text:style-name="T8"> Figma • Adobe Creative Suite • CAD/3D (OnShape) • HTML/CSS • AI Tools (Claude, Cursor) • Prototyping • AI-Augmented Workflows • AI-Integrated Design</text:span></text:p>
      <text:p text:style-name="P8"/>
      <text:p text:style-name="P7"><text:span text:style-name="T2">EDUCATION</text:span></text:p>
      <text:p text:style-name="P22"><text:span text:style-name="T13">Arizona State University</text:span><text:span text:style-name="T14"> </text:span><text:span text:style-name="T7">| </text:span><text:span text:style-name="T9">Bachelor of Arts, Humanities and Architectural Theory</text:span></text:p>
      <text:p text:style-name="P6"/>
      <text:p text:style-name="P7"><text:span text:style-name="T2">COMMUNITY</text:span></text:p>
      <text:p text:style-name="P7"><text:span text:style-name="T4">Board Director | </text:span>How Weird Street Faire 501(c)(3) <text:span text:style-name="T5">SF street fair with successful 20+ year run (2004 - 202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999999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r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700" meta:character-count="5082" meta:non-whitespace-character-count="4420"/>
    <meta:generator>LibreOfficeDev/6.0.5.2$Linux_X86_64 LibreOffice_project/</meta:generator>
  </office:meta>
</office:document-meta>
</file>